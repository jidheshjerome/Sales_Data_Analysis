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F0000021C511FEF70.png" manifest:media-type="image/png"/>
  <manifest:file-entry manifest:full-path="Pictures/100000010000021D00000253FE8FC5FD.png" manifest:media-type="image/png"/>
  <manifest:file-entry manifest:full-path="Pictures/10000001000005640000019710A05483.png" manifest:media-type="image/png"/>
  <manifest:file-entry manifest:full-path="Pictures/10000001000000B5000000E630878F5A.png" manifest:media-type="image/png"/>
  <manifest:file-entry manifest:full-path="Pictures/10000001000000F7000001A509F4E4BF.png" manifest:media-type="image/png"/>
  <manifest:file-entry manifest:full-path="Pictures/100000010000014B000001CD65D61F1D.png" manifest:media-type="image/png"/>
  <manifest:file-entry manifest:full-path="Pictures/1000000100000583000001CB3BFDC078.png" manifest:media-type="image/png"/>
  <manifest:file-entry manifest:full-path="Pictures/1000000100000562000001BFD929AFC9.png" manifest:media-type="image/png"/>
  <manifest:file-entry manifest:full-path="Pictures/1000000100000127000000E23A11A0CC.png" manifest:media-type="image/png"/>
  <manifest:file-entry manifest:full-path="Pictures/10000001000000DD000000DA3064024E.png" manifest:media-type="image/png"/>
  <manifest:file-entry manifest:full-path="Pictures/100000010000013B000000DCE1566207.png" manifest:media-type="image/png"/>
  <manifest:file-entry manifest:full-path="Pictures/1000000100000130000000946ADE4D8D.png" manifest:media-type="image/png"/>
  <manifest:file-entry manifest:full-path="Pictures/10000001000001BE000000C1259CC32C.png" manifest:media-type="image/png"/>
  <manifest:file-entry manifest:full-path="Pictures/100000010000010C000000A0669C53A5.png" manifest:media-type="image/png"/>
  <manifest:file-entry manifest:full-path="Pictures/10000001000000C8000000B60E919271.png" manifest:media-type="image/png"/>
  <manifest:file-entry manifest:full-path="Pictures/10000001000001A2000000AA4A6514DF.png" manifest:media-type="image/png"/>
  <manifest:file-entry manifest:full-path="Pictures/1000000100000526000002E26104014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fo:font-weight="normal" officeooo:rsid="00091c42" officeooo:paragraph-rsid="00091c42" style:font-size-asian="24.5pt" style:font-weight-asian="normal" style:font-size-complex="28pt" style:font-weight-complex="normal"/>
    </style:style>
    <style:style style:name="P2" style:family="paragraph" style:parent-style-name="Standard">
      <style:paragraph-properties fo:text-align="center" style:justify-single-word="false"/>
      <style:text-properties fo:font-size="28pt" officeooo:rsid="00091c42" officeooo:paragraph-rsid="00091c42" style:font-size-asian="24.5pt" style:font-size-complex="28pt"/>
    </style:style>
    <style:style style:name="P3" style:family="paragraph" style:parent-style-name="Standard">
      <style:paragraph-properties fo:text-align="left" style:justify-single-word="false"/>
      <style:text-properties fo:font-size="18pt" fo:font-weight="bold" officeooo:rsid="00091c42" officeooo:paragraph-rsid="00091c42" style:font-size-asian="15.75pt" style:font-weight-asian="bold" style:font-size-complex="18pt" style:font-weight-complex="bold"/>
    </style:style>
    <style:style style:name="P4" style:family="paragraph" style:parent-style-name="Standard">
      <style:paragraph-properties fo:text-align="left" style:justify-single-word="false"/>
      <style:text-properties fo:font-size="18pt" officeooo:rsid="00091c42" officeooo:paragraph-rsid="00091c42" style:font-size-asian="15.75pt" style:font-size-complex="18pt"/>
    </style:style>
    <style:style style:name="P5" style:family="paragraph" style:parent-style-name="Standard_20__28_WW_29_">
      <style:paragraph-properties fo:margin-left="0cm" fo:margin-right="0cm" fo:text-align="justify" style:justify-single-word="false" fo:text-indent="0cm" style:auto-text-indent="false" style:writing-mode="lr-tb"/>
    </style:style>
    <style:style style:name="P6" style:family="paragraph" style:parent-style-name="Standard_20__28_WW_29_">
      <style:paragraph-properties fo:margin-left="0cm" fo:margin-right="0cm" fo:text-align="justify" style:justify-single-word="false" fo:text-indent="0cm" style:auto-text-indent="false" style:writing-mode="lr-tb"/>
      <style:text-properties fo:color="#000000" loext:opacity="100%" style:font-name="Consolas" fo:font-size="11pt" officeooo:rsid="00091c42" style:font-size-asian="11pt"/>
    </style:style>
    <style:style style:name="P7" style:family="paragraph" style:parent-style-name="Standard_20__28_WW_29_">
      <style:paragraph-properties fo:margin-left="0cm" fo:margin-right="0cm" fo:text-indent="0cm" style:auto-text-indent="false" style:writing-mode="lr-tb"/>
      <style:text-properties fo:color="#000000" loext:opacity="100%" style:font-name="Consolas" fo:font-size="18pt" fo:font-weight="bold" officeooo:rsid="00091c42" officeooo:paragraph-rsid="00091c42" style:font-size-asian="15.75pt" style:font-weight-asian="bold" style:font-size-complex="18pt" style:font-weight-complex="bold"/>
    </style:style>
    <style:style style:name="P8" style:family="paragraph" style:parent-style-name="Standard_20__28_WW_29_" style:list-style-name="WWNum1">
      <style:paragraph-properties fo:margin-left="0.706cm" fo:margin-right="0cm" fo:text-indent="-0.706cm" style:auto-text-indent="false" style:writing-mode="lr-tb"/>
    </style:style>
    <style:style style:name="P9" style:family="paragraph" style:parent-style-name="Standard_20__28_WW_29_" style:list-style-name="WWNum1">
      <style:paragraph-properties fo:margin-left="0.706cm" fo:margin-right="0cm" fo:text-indent="-0.706cm" style:auto-text-indent="false" style:writing-mode="lr-tb"/>
      <style:text-properties fo:color="#000000" loext:opacity="100%" style:font-name="Consolas" fo:font-size="11pt" officeooo:rsid="00098827" style:font-size-asian="11pt"/>
    </style:style>
    <style:style style:name="P10" style:family="paragraph" style:parent-style-name="Standard_20__28_WW_29_">
      <style:paragraph-properties fo:margin-left="0cm" fo:margin-right="0cm" fo:text-indent="0cm" style:auto-text-indent="false" style:writing-mode="lr-tb"/>
      <style:text-properties fo:color="#000000" loext:opacity="100%" style:font-name="Consolas" fo:font-size="11pt" style:font-size-asian="11pt"/>
    </style:style>
    <style:style style:name="P11" style:family="paragraph" style:parent-style-name="Standard_20__28_WW_29_">
      <style:paragraph-properties fo:margin-left="0cm" fo:margin-right="0cm" fo:text-indent="0cm" style:auto-text-indent="false" style:writing-mode="lr-tb"/>
      <style:text-properties fo:color="#000000" loext:opacity="100%" style:font-name="Consolas" fo:font-size="18pt" fo:font-weight="bold" officeooo:rsid="00098827" officeooo:paragraph-rsid="00098827" style:font-size-asian="15.75pt" style:font-weight-asian="bold" style:font-size-complex="18pt" style:font-weight-complex="bold"/>
    </style:style>
    <style:style style:name="P12" style:family="paragraph" style:parent-style-name="Standard_20__28_WW_29_">
      <style:paragraph-properties fo:margin-left="0cm" fo:margin-right="0cm" fo:text-indent="0cm" style:auto-text-indent="false" style:writing-mode="lr-tb"/>
      <style:text-properties fo:color="#000000" loext:opacity="100%" style:font-name="Consolas" fo:font-size="11pt" officeooo:paragraph-rsid="00098827" style:font-size-asian="11pt"/>
    </style:style>
    <style:style style:name="P13" style:family="paragraph" style:parent-style-name="Standard_20__28_WW_29_" style:list-style-name="WWNum1">
      <style:paragraph-properties fo:margin-left="0cm" fo:margin-right="0cm" fo:text-indent="0cm" style:auto-text-indent="false" style:writing-mode="lr-tb"/>
    </style:style>
    <style:style style:name="P14" style:family="paragraph" style:parent-style-name="Standard">
      <style:paragraph-properties fo:margin-left="0cm" fo:margin-right="0cm" fo:text-indent="0cm" style:auto-text-indent="false" style:writing-mode="lr-tb"/>
      <style:text-properties fo:color="#000000" loext:opacity="100%" style:font-name="Consolas" fo:font-size="11pt" style:font-size-asian="11pt"/>
    </style:style>
    <style:style style:name="P15" style:family="paragraph" style:parent-style-name="Standard">
      <style:paragraph-properties fo:margin-left="0cm" fo:margin-right="0cm" fo:text-indent="0cm" style:auto-text-indent="false" style:writing-mode="lr-tb"/>
      <style:text-properties fo:color="#000000" loext:opacity="100%" style:font-name="Consolas" fo:font-size="18pt" fo:font-weight="bold" officeooo:rsid="00091c42" officeooo:paragraph-rsid="00091c42" style:font-size-asian="15.75pt" style:font-weight-asian="bold" style:font-size-complex="18pt" style:font-weight-complex="bold"/>
    </style:style>
    <style:style style:name="P16" style:family="paragraph" style:parent-style-name="Standard_20__28_WW_29_" style:list-style-name="WWNum1">
      <style:paragraph-properties fo:margin-left="0cm" fo:margin-right="0cm" fo:text-indent="0cm" style:auto-text-indent="false" style:writing-mode="lr-tb"/>
      <style:text-properties fo:color="#000000" loext:opacity="100%" style:font-name="Consolas" fo:font-size="11pt" fo:font-weight="bold" style:font-size-asian="11pt" style:font-weight-asian="bold"/>
    </style:style>
    <style:style style:name="P17" style:family="paragraph" style:parent-style-name="Standard_20__28_WW_29_">
      <style:paragraph-properties fo:margin-left="0cm" fo:margin-right="0cm" fo:text-indent="0cm" style:auto-text-indent="false" style:writing-mode="lr-tb"/>
      <style:text-properties fo:color="#000000" loext:opacity="100%" style:font-name="Consolas" fo:font-size="11pt" fo:font-weight="bold" style:font-size-asian="11pt" style:font-weight-asian="bold"/>
    </style:style>
    <style:style style:name="P18" style:family="paragraph" style:parent-style-name="Standard">
      <style:paragraph-properties fo:margin-left="0cm" fo:margin-right="0cm" fo:text-align="justify" style:justify-single-word="false" fo:text-indent="0cm" style:auto-text-indent="false" style:writing-mode="lr-tb"/>
      <style:text-properties fo:color="#000000" loext:opacity="100%" style:font-name="Consolas" fo:font-size="11pt" officeooo:rsid="00091c42" style:font-size-asian="11pt"/>
    </style:style>
    <style:style style:name="P19" style:family="paragraph" style:parent-style-name="Standard_20__28_WW_29_">
      <style:paragraph-properties fo:margin-left="0cm" fo:margin-right="0cm" fo:text-indent="0cm" style:auto-text-indent="false" style:writing-mode="lr-tb"/>
      <style:text-properties fo:color="#000000" loext:opacity="100%" style:font-name="Consolas" fo:font-size="11pt" officeooo:rsid="00091c42" style:font-size-asian="11pt"/>
    </style:style>
    <style:style style:name="P20" style:family="paragraph" style:parent-style-name="Standard">
      <style:paragraph-properties fo:text-align="left" style:justify-single-word="false"/>
      <style:text-properties fo:font-size="18pt" officeooo:rsid="000b805b" officeooo:paragraph-rsid="000b805b" style:font-size-asian="15.75pt" style:font-size-complex="18pt"/>
    </style:style>
    <style:style style:name="P21" style:family="paragraph" style:parent-style-name="Standard">
      <style:paragraph-properties fo:text-align="left" style:justify-single-word="false"/>
      <style:text-properties fo:font-size="11pt" officeooo:rsid="000b805b" officeooo:paragraph-rsid="000b805b" style:font-size-asian="9.60000038146973pt" style:font-size-complex="11pt"/>
    </style:style>
    <style:style style:name="P22" style:family="paragraph" style:parent-style-name="Standard_20__28_WW_29_">
      <style:paragraph-properties fo:margin-left="0cm" fo:margin-right="0cm" fo:text-indent="0cm" style:auto-text-indent="false" style:writing-mode="lr-tb"/>
      <style:text-properties fo:color="#000000" loext:opacity="100%" style:font-name="Consolas" fo:font-size="18pt" fo:font-weight="bold" officeooo:rsid="000b805b" officeooo:paragraph-rsid="000b805b" style:font-size-asian="15.75pt" style:font-weight-asian="bold" style:font-size-complex="18pt" style:font-weight-complex="bold"/>
    </style:style>
    <style:style style:name="P23" style:family="paragraph" style:parent-style-name="Standard_20__28_WW_29_">
      <style:paragraph-properties fo:margin-left="0cm" fo:margin-right="0cm" fo:text-indent="0cm" style:auto-text-indent="false" style:writing-mode="lr-tb"/>
      <style:text-properties fo:color="#000000" loext:opacity="100%" style:font-name="Consolas" fo:font-size="11pt" fo:font-weight="normal" officeooo:rsid="000b805b" style:font-size-asian="9.60000038146973pt" style:font-weight-asian="normal" style:font-size-complex="11pt" style:font-weight-complex="normal"/>
    </style:style>
    <style:style style:name="P24" style:family="paragraph" style:parent-style-name="Standard_20__28_WW_29_" style:list-style-name="L1">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bold" officeooo:rsid="000e21a4" officeooo:paragraph-rsid="000e21a4" style:font-size-asian="9.60000038146973pt" style:font-weight-asian="bold" style:font-size-complex="11pt" style:font-weight-complex="bold"/>
    </style:style>
    <style:style style:name="P25"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normal" officeooo:rsid="000e21a4" officeooo:paragraph-rsid="000e21a4" style:font-size-asian="9.60000038146973pt" style:font-weight-asian="normal" style:font-size-complex="11pt" style:font-weight-complex="normal"/>
    </style:style>
    <style:style style:name="P26"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bold" officeooo:rsid="000e21a4" officeooo:paragraph-rsid="000e21a4" style:font-size-asian="9.60000038146973pt" style:font-weight-asian="bold" style:font-size-complex="11pt" style:font-weight-complex="bold"/>
    </style:style>
    <style:style style:name="P27"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bold" officeooo:rsid="000fd03f" officeooo:paragraph-rsid="000fd03f" style:font-size-asian="9.60000038146973pt" style:font-weight-asian="bold" style:font-size-complex="11pt" style:font-weight-complex="bold"/>
    </style:style>
    <style:style style:name="P28"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normal" officeooo:rsid="000fd03f" officeooo:paragraph-rsid="000fd03f" style:font-size-asian="9.60000038146973pt" style:font-weight-asian="normal" style:font-size-complex="11pt" style:font-weight-complex="normal"/>
    </style:style>
    <style:style style:name="P29"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bold" officeooo:rsid="000fd03f" officeooo:paragraph-rsid="00127d4f" style:font-size-asian="9.60000038146973pt" style:font-weight-asian="bold" style:font-size-complex="11pt" style:font-weight-complex="bold"/>
    </style:style>
    <style:style style:name="P30"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normal" officeooo:rsid="00127d4f" officeooo:paragraph-rsid="00127d4f" style:font-size-asian="9.60000038146973pt" style:font-weight-asian="normal" style:font-size-complex="11pt" style:font-weight-complex="normal"/>
    </style:style>
    <style:style style:name="P31" style:family="paragraph" style:parent-style-name="Standard_20__28_WW_29_">
      <style:paragraph-properties fo:margin-left="0cm" fo:margin-right="0cm" fo:text-indent="0cm" style:auto-text-indent="false" style:writing-mode="lr-tb">
        <style:tab-stops>
          <style:tab-stop style:position="0.275cm"/>
          <style:tab-stop style:position="2.138cm"/>
        </style:tab-stops>
      </style:paragraph-properties>
      <style:text-properties fo:font-size="11pt" fo:font-weight="normal" officeooo:rsid="001121cc" officeooo:paragraph-rsid="00127d4f" style:font-size-asian="9.60000038146973pt" style:font-weight-asian="normal" style:font-size-complex="11pt" style:font-weight-complex="normal"/>
    </style:style>
    <style:style style:name="P32"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121cc" officeooo:paragraph-rsid="00127d4f" style:font-size-asian="9.60000038146973pt" style:font-weight-asian="normal" style:font-size-complex="11pt" style:font-weight-complex="normal"/>
    </style:style>
    <style:style style:name="P33"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27d4f" officeooo:paragraph-rsid="00127d4f" style:font-size-asian="9.60000038146973pt" style:font-weight-asian="bold" style:font-size-complex="11pt" style:font-weight-complex="bold"/>
    </style:style>
    <style:style style:name="P34"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27d4f" officeooo:paragraph-rsid="00127d4f" style:font-size-asian="9.60000038146973pt" style:font-weight-asian="normal" style:font-size-complex="11pt" style:font-weight-complex="normal"/>
    </style:style>
    <style:style style:name="P35"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27d4f" officeooo:paragraph-rsid="0012de1b" style:font-size-asian="9.60000038146973pt" style:font-weight-asian="bold" style:font-size-complex="11pt" style:font-weight-complex="bold"/>
    </style:style>
    <style:style style:name="P36"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2de1b" officeooo:paragraph-rsid="0012de1b" style:font-size-asian="9.60000038146973pt" style:font-weight-asian="normal" style:font-size-complex="11pt" style:font-weight-complex="normal"/>
    </style:style>
    <style:style style:name="P37"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2de1b" officeooo:paragraph-rsid="0012de1b" style:font-size-asian="9.60000038146973pt" style:font-weight-asian="bold" style:font-size-complex="11pt" style:font-weight-complex="bold"/>
    </style:style>
    <style:style style:name="P38"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4ac2b" officeooo:paragraph-rsid="0012de1b" style:font-size-asian="9.60000038146973pt" style:font-weight-asian="normal" style:font-size-complex="11pt" style:font-weight-complex="normal"/>
    </style:style>
    <style:style style:name="P39"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8pt" fo:font-weight="bold" officeooo:rsid="00163333" officeooo:paragraph-rsid="00163333" style:font-size-asian="15.75pt" style:font-weight-asian="bold" style:font-size-complex="18pt" style:font-weight-complex="bold"/>
    </style:style>
    <style:style style:name="P40"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63333" officeooo:paragraph-rsid="00163333" style:font-size-asian="9.60000038146973pt" style:font-weight-asian="normal" style:font-size-complex="11pt" style:font-weight-complex="normal"/>
    </style:style>
    <style:style style:name="P41"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b8f86" officeooo:paragraph-rsid="001b8f86" style:font-size-asian="9.60000038146973pt" style:font-weight-asian="bold" style:font-size-complex="11pt" style:font-weight-complex="bold"/>
    </style:style>
    <style:style style:name="P42"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b8f86" officeooo:paragraph-rsid="001b8f86" style:font-size-asian="9.60000038146973pt" style:font-weight-asian="normal" style:font-size-complex="11pt" style:font-weight-complex="normal"/>
    </style:style>
    <style:style style:name="P43"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bcffc" officeooo:paragraph-rsid="001bcffc" style:font-size-asian="9.60000038146973pt" style:font-weight-asian="bold" style:font-size-complex="11pt" style:font-weight-complex="bold"/>
    </style:style>
    <style:style style:name="P44"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bcffc" officeooo:paragraph-rsid="001bcffc" style:font-size-asian="9.60000038146973pt" style:font-weight-asian="normal" style:font-size-complex="11pt" style:font-weight-complex="normal"/>
    </style:style>
    <style:style style:name="P45"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c7e3a" officeooo:paragraph-rsid="001c7e3a" style:font-size-asian="9.60000038146973pt" style:font-weight-asian="bold" style:font-size-complex="11pt" style:font-weight-complex="bold"/>
    </style:style>
    <style:style style:name="P46"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c7e3a" officeooo:paragraph-rsid="001c7e3a" style:font-size-asian="9.60000038146973pt" style:font-weight-asian="normal" style:font-size-complex="11pt" style:font-weight-complex="normal"/>
    </style:style>
    <style:style style:name="P47"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1e0f27" officeooo:paragraph-rsid="001e0f27" style:font-size-asian="9.60000038146973pt" style:font-weight-asian="bold" style:font-size-complex="11pt" style:font-weight-complex="bold"/>
    </style:style>
    <style:style style:name="P48"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1f7567" officeooo:paragraph-rsid="001f7567" style:font-size-asian="9.60000038146973pt" style:font-weight-asian="normal" style:font-size-complex="11pt" style:font-weight-complex="normal"/>
    </style:style>
    <style:style style:name="P49"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bold" officeooo:rsid="00207c1c" officeooo:paragraph-rsid="00207c1c" style:font-size-asian="9.60000038146973pt" style:font-weight-asian="bold" style:font-size-complex="11pt" style:font-weight-complex="bold"/>
    </style:style>
    <style:style style:name="P50" style:family="paragraph" style:parent-style-name="Standard_20__28_WW_29_">
      <style:paragraph-properties fo:margin-left="0cm" fo:margin-right="0cm" fo:text-align="justify" style:justify-single-word="false" fo:text-indent="0cm" style:auto-text-indent="false" style:writing-mode="lr-tb">
        <style:tab-stops>
          <style:tab-stop style:position="0.275cm"/>
          <style:tab-stop style:position="2.138cm"/>
        </style:tab-stops>
      </style:paragraph-properties>
      <style:text-properties fo:font-size="11pt" fo:font-weight="normal" officeooo:rsid="00207c1c" officeooo:paragraph-rsid="00207c1c" style:font-size-asian="9.60000038146973pt" style:font-weight-asian="normal" style:font-size-complex="11pt" style:font-weight-complex="normal"/>
    </style:style>
    <style:style style:name="T1" style:family="text">
      <style:text-properties fo:color="#000000" loext:opacity="100%" style:font-name="Consolas" fo:font-size="11pt" style:font-size-asian="11pt"/>
    </style:style>
    <style:style style:name="T2" style:family="text">
      <style:text-properties fo:color="#000000" loext:opacity="100%" style:font-name="Consolas" fo:font-size="11pt" officeooo:rsid="00091c42" style:font-size-asian="11pt"/>
    </style:style>
    <style:style style:name="T3" style:family="text">
      <style:text-properties fo:color="#000000" loext:opacity="100%" style:font-name="Consolas" fo:font-size="11pt" officeooo:rsid="00098827" style:font-size-asian="11pt"/>
    </style:style>
    <style:style style:name="T4" style:family="text">
      <style:text-properties fo:color="#000000" loext:opacity="100%" style:font-name="Consolas" fo:font-size="11pt" fo:font-weight="bold" style:font-size-asian="11pt" style:font-weight-asian="bold"/>
    </style:style>
    <style:style style:name="T5" style:family="text">
      <style:text-properties fo:font-weight="normal" officeooo:rsid="00098827" style:font-weight-asian="normal" style:font-weight-complex="normal"/>
    </style:style>
    <style:style style:name="T6" style:family="text">
      <style:text-properties fo:font-weight="normal" officeooo:rsid="0009b3ad" style:font-weight-asian="normal" style:font-weight-complex="normal"/>
    </style:style>
    <style:style style:name="T7" style:family="text">
      <style:text-properties fo:color="#000000" loext:opacity="100%" style:font-name="Consolas" fo:font-size="11pt" fo:font-weight="normal" style:font-size-asian="9.60000038146973pt" style:font-weight-asian="normal" style:font-size-complex="11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0fd03f" style:font-weight-asian="normal" style:font-weight-complex="normal"/>
    </style:style>
    <style:style style:name="T10" style:family="text">
      <style:text-properties fo:font-weight="normal" officeooo:rsid="001121cc" style:font-weight-asian="normal" style:font-weight-complex="normal"/>
    </style:style>
    <style:style style:name="T11" style:family="text">
      <style:text-properties officeooo:rsid="001121cc"/>
    </style:style>
    <style:style style:name="T12" style:family="text">
      <style:text-properties fo:font-weight="normal" officeooo:rsid="00127d4f" style:font-weight-asian="normal" style:font-weight-complex="normal"/>
    </style:style>
    <style:style style:name="T13" style:family="text">
      <style:text-properties fo:font-weight="normal" officeooo:rsid="0012de1b" style:font-weight-asian="normal" style:font-weight-complex="normal"/>
    </style:style>
    <style:style style:name="T14" style:family="text">
      <style:text-properties fo:font-weight="normal" officeooo:rsid="0014ac2b" style:font-weight-asian="normal" style:font-weight-complex="normal"/>
    </style:style>
    <style:style style:name="T15" style:family="text">
      <style:text-properties fo:color="#000000" loext:opacity="100%" style:font-name="Consolas" fo:font-size="18pt" fo:font-weight="bold" style:font-size-asian="15.75pt" style:font-weight-asian="bold" style:font-size-complex="18pt" style:font-weight-complex="bold"/>
    </style:style>
    <style:style style:name="T16" style:family="text">
      <style:text-properties fo:color="#000000" loext:opacity="100%" style:font-name="Consolas" fo:font-size="11pt" fo:font-weight="bold" style:font-size-asian="9.60000038146973pt" style:font-weight-asian="bold" style:font-size-complex="11pt" style:font-weight-complex="bold"/>
    </style:style>
    <style:style style:name="T17" style:family="text">
      <style:text-properties officeooo:rsid="001bcffc"/>
    </style:style>
    <style:style style:name="T18" style:family="text">
      <style:text-properties officeooo:rsid="001e0f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LES DATA ANALYSIS</text:p>
      <text:p text:style-name="P2"/>
      <text:p text:style-name="P3">1.Project Overview</text:p>
      <text:p text:style-name="P4"/>
      <text:p text:style-name="P5"><text:span text:style-name="T1">This project analy</text:span><text:span text:style-name="T2">s</text:span><text:span text:style-name="T1">es sales </text:span><text:span text:style-name="T2">from 2023 to 2025</text:span><text:span text:style-name="T1"> </text:span><text:span text:style-name="T2">of a store </text:span><text:span text:style-name="T1">across various product</text:span><text:span text:style-name="T2">s</text:span><text:span text:style-name="T1">. The main goal is to analy</text:span><text:span text:style-name="T2">s</text:span><text:span text:style-name="T1">e </text:span><text:span text:style-name="T2">the sales</text:span><text:span text:style-name="T1"> performance </text:span><text:span text:style-name="T2">done by the store on these years and find a way to boost the sales in the future.</text:span></text:p>
      <text:p text:style-name="P6"/>
      <text:p text:style-name="P7">2.Dataset summary</text:p>
      <text:p text:style-name="P7"/>
      <text:list text:style-name="WWNum1">
        <text:list-item>
          <text:list>
            <text:list-item>
              <text:p text:style-name="P8"><text:span text:style-name="T1">Columns- </text:span><text:span text:style-name="T3">16</text:span></text:p>
            </text:list-item>
            <text:list-item>
              <text:p text:style-name="P8"><text:span text:style-name="T1">Rows- </text:span><text:span text:style-name="T3">1486</text:span></text:p>
            </text:list-item>
            <text:list-item>
              <text:p text:style-name="P8"><text:span text:style-name="T1">Data consist of </text:span><text:span text:style-name="T3">sales of from the year 2023 to 2025 with unit price, quantity sold, regions, salespersons etc...</text:span></text:p>
              <text:p text:style-name="P9"/>
            </text:list-item>
          </text:list>
        </text:list-item>
      </text:list>
      <text:p text:style-name="P10"/>
      <text:p text:style-name="P11">3.Data Analysis using Python</text:p>
      <text:p text:style-name="P12"/>
      <text:p text:style-name="P12"/>
      <text:p text:style-name="P10">Data preparation and cleaning was performed by using python.</text:p>
      <text:p text:style-name="P10" loext:marker-style-name="T1"/>
      <text:list text:continue-numbering="true" text:style-name="WWNum1">
        <text:list-item>
          <text:list>
            <text:list-header>
              <text:p text:style-name="P13"><text:span text:style-name="T4">Data loading:</text:span><text:span text:style-name="T1"> Imported dataset using pandas.</text:span></text:p>
            </text:list-header>
          </text:list>
        </text:list-item>
      </text:list>
      <text:p text:style-name="P10"/>
      <text:list text:continue-numbering="true" text:style-name="WWNum1">
        <text:list-item>
          <text:list>
            <text:list-header>
              <text:p text:style-name="P13"><text:span text:style-name="T4">Data exploration:</text:span><text:span text:style-name="T1"> Used df.info() for data structure </text:span><text:span text:style-name="T3">analysis</text:span><text:span text:style-name="T1">.</text:span></text:p>
            </text:list-header>
          </text:list>
        </text:list-item>
      </text:list>
      <text:p text:style-name="P10"/>
      <text:p text:style-name="P10"/>
      <text:p text:style-name="P10"><draw:frame draw:style-name="fr1" draw:name="Image1" text:anchor-type="char" svg:x="0.166cm" svg:y="0cm" svg:width="9.938cm" svg:height="11.516cm" draw:z-index="0"><draw:image xlink:href="Pictures/10000001000001FF0000021C511FEF70.png" xlink:type="simple" xlink:show="embed" xlink:actuate="onLoad" draw:mime-type="image/png"/></draw:frame></text:p>
      <text:p text:style-name="P14"/>
      <text:p text:style-name="P12"><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continue-numbering="true" text:style-name="WWNum1">
        <text:list-item>
          <text:list>
            <text:list-header>
              <text:p text:style-name="P16"/>
              <text:p text:style-name="P16"><text:soft-page-break/>Data cleaning and processing: <text:span text:style-name="T5">Changed data types of DateID, </text:span><text:span text:style-name="T6">OrderDate, DeliveryDate. Then found some missing values. Since the 50% of data in a each row was missing, those rows were removed completely. If those values were assumed and filled, it could affect the final output in analysis.</text:span></text:p>
            </text:list-header>
          </text:list>
        </text:list-item>
      </text:list>
      <text:p text:style-name="P17"/>
      <text:p text:style-name="P17"><draw:frame draw:style-name="fr1" draw:name="Image2" text:anchor-type="char" svg:x="0.065cm" svg:y="0.191cm" svg:width="9.283cm" svg:height="11.199cm" draw:z-index="1"><draw:image xlink:href="Pictures/100000010000021D00000253FE8FC5FD.png" xlink:type="simple" xlink:show="embed" xlink:actuate="onLoad" draw:mime-type="image/png"/></draw:frame><draw:frame draw:style-name="fr1" draw:name="Image3" text:anchor-type="char" svg:x="11.045cm" svg:y="0.226cm" svg:width="6.535cm" svg:height="11.141cm" draw:z-index="2"><draw:image xlink:href="Pictures/10000001000000F7000001A509F4E4BF.png" xlink:type="simple" xlink:show="embed" xlink:actuate="onLoad" draw:mime-type="image/png"/></draw:frame></text:p>
      <text:p text:style-name="P15"/>
      <text:p text:style-name="P18"/>
      <text:p text:style-name="P19"/>
      <text:p text:style-name="P19"/>
      <text:p text:style-name="P4"/>
      <text:p text:style-name="P4"/>
      <text:p text:style-name="P4"/>
      <text:p text:style-name="P4"/>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4" text:anchor-type="char" svg:x="-0.106cm" svg:y="0.064cm" svg:width="17cm" svg:height="5.53cm" draw:z-index="3"><draw:image xlink:href="Pictures/1000000100000583000001CB3BFDC078.png" xlink:type="simple" xlink:show="embed" xlink:actuate="onLoad" draw:mime-type="image/png"/></draw:frame></text:p>
      <text:p text:style-name="P20"/>
      <text:p text:style-name="P20"/>
      <text:p text:style-name="P20"/>
      <text:p text:style-name="P20"/>
      <text:p text:style-name="P20"/>
      <text:p text:style-name="P20"><draw:frame draw:style-name="fr1" draw:name="Image5" text:anchor-type="char" svg:x="-0.005cm" svg:y="0.055cm" svg:width="8.255cm" svg:height="11.497cm" draw:z-index="4"><draw:image xlink:href="Pictures/100000010000014B000001CD65D61F1D.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Found total sales by multiplying unit price with quantity sold. Then found profit by subtracting shipping cost from sales.</text:p>
      <text:p text:style-name="P21"/>
      <text:p text:style-name="P21"><draw:frame draw:style-name="fr2" draw:name="Image6" text:anchor-type="char" svg:width="17cm" svg:height="5.514cm" draw:z-index="5"><draw:image xlink:href="Pictures/1000000100000562000001BFD929AFC9.png" xlink:type="simple" xlink:show="embed" xlink:actuate="onLoad" draw:mime-type="image/png"/></draw:frame><text:tab/></text:p>
      <text:p text:style-name="P21"/>
      <text:p text:style-name="P21"><draw:frame draw:style-name="fr2" draw:name="Image7" text:anchor-type="char" svg:width="17cm" svg:height="5.013cm" draw:z-index="6"><draw:image xlink:href="Pictures/10000001000005640000019710A05483.png" xlink:type="simple" xlink:show="embed" xlink:actuate="onLoad" draw:mime-type="image/png"/></draw:frame><text:tab/></text:p>
      <text:list text:continue-numbering="true" text:style-name="WWNum1">
        <text:list-item>
          <text:list>
            <text:list-header>
              <text:p text:style-name="P13"><text:soft-page-break/><text:span text:style-name="T4">Database integration</text:span><text:span text:style-name="T1">: Connected python script to MS SQL and loaded cleaned dataset into the database for SQL analysis.</text:span></text:p>
            </text:list-header>
          </text:list>
        </text:list-item>
      </text:list>
      <text:p text:style-name="P10"/>
      <text:p text:style-name="P10"/>
      <text:p text:style-name="P22">4.Data Analysis using SQL</text:p>
      <text:p text:style-name="P22"/>
      <text:p text:style-name="P10">Structured analysis in MS SQL was used to answer business questions:</text:p>
      <text:p text:style-name="P23" loext:marker-style-name="T7"/>
      <text:list text:style-name="L1">
        <text:list-header>
          <text:p text:style-name="P24" loext:marker-style-name="T7">1. Regional sales and profit: <text:span text:style-name="T8">Calculated total sales and profit created by each regions. </text:span><text:span text:style-name="T9">The north region has the highest performance. </text:span></text:p>
        </text:list-header>
      </text:list>
      <text:p text:style-name="P25" loext:marker-style-name="T7"/>
      <text:p text:style-name="P25" loext:marker-style-name="T7"><draw:frame draw:style-name="fr1" draw:name="Image8" text:anchor-type="char" svg:x="0.228cm" svg:y="0.318cm" svg:width="6.766cm" svg:height="5.184cm" draw:z-index="7"><draw:image xlink:href="Pictures/1000000100000127000000E23A11A0CC.png" xlink:type="simple" xlink:show="embed" xlink:actuate="onLoad" draw:mime-type="image/png"/></draw:frame><text:s text:c="3"/></text:p>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6" loext:marker-style-name="T7">2. Top products: <text:span text:style-name="T8">Found top products which created high sales. </text:span><text:span text:style-name="T9">Laptop, Tablet and Printer holds the top 3 highest sales.</text:span></text:p>
      <text:p text:style-name="P25" loext:marker-style-name="T7"/>
      <text:p text:style-name="P25" loext:marker-style-name="T7"><draw:frame draw:style-name="fr1" draw:name="Image9" text:anchor-type="char" svg:x="0.418cm" svg:y="0.106cm" svg:width="4.99cm" svg:height="4.923cm" draw:z-index="8"><draw:image xlink:href="Pictures/10000001000000DD000000DA3064024E.png" xlink:type="simple" xlink:show="embed" xlink:actuate="onLoad" draw:mime-type="image/png"/></draw:frame><text:s text:c="3"/></text:p>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6" loext:marker-style-name="T7">3. Employee performance: <text:span text:style-name="T8">Evaluated which salesperson creates more profit. </text:span><text:span text:style-name="T10">Alice sold highest quantity but Bob made higher profit than Alice by selling less quantity than Alice. It’s may be because Bob sold high priced products than Alice.</text:span></text:p>
      <text:p text:style-name="P25" loext:marker-style-name="T7"/>
      <text:p text:style-name="P25" loext:marker-style-name="T7"><draw:frame draw:style-name="fr1" draw:name="Image10" text:anchor-type="char" svg:x="0.545cm" svg:y="0.339cm" svg:width="7.597cm" svg:height="5.306cm" draw:z-index="10"><draw:image xlink:href="Pictures/100000010000013B000000DCE1566207.png" xlink:type="simple" xlink:show="embed" xlink:actuate="onLoad" draw:mime-type="image/png"/></draw:frame><text:s text:c="3"/></text:p>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
      <text:p text:style-name="P25" loext:marker-style-name="T7"><text:soft-page-break/></text:p>
      <text:p text:style-name="P25" loext:marker-style-name="T7"/>
      <text:p text:style-name="P25" loext:marker-style-name="T7"/>
      <text:p text:style-name="P25" loext:marker-style-name="T7"/>
      <text:p text:style-name="P27" loext:marker-style-name="T7">4. Customer type sales: <text:span text:style-name="T8">Calculated which customer type created more sales and profit. </text:span><text:span text:style-name="T10">Retail customers made more than Wholesale but there isn’t much difference in sales and profit between them.</text:span></text:p>
      <text:p text:style-name="P28" loext:marker-style-name="T7"/>
      <text:p text:style-name="P28" loext:marker-style-name="T7"><draw:frame draw:style-name="fr1" draw:name="Image11" text:anchor-type="char" svg:x="0.584cm" svg:y="0.296cm" svg:width="6.69cm" svg:height="3.258cm" draw:z-index="9"><draw:image xlink:href="Pictures/1000000100000130000000946ADE4D8D.png" xlink:type="simple" xlink:show="embed" xlink:actuate="onLoad" draw:mime-type="image/png"/></draw:frame></text:p>
      <text:p text:style-name="P28" loext:marker-style-name="T7"/>
      <text:p text:style-name="P28" loext:marker-style-name="T7"/>
      <text:p text:style-name="P28" loext:marker-style-name="T7"/>
      <text:p text:style-name="P28" loext:marker-style-name="T7"/>
      <text:p text:style-name="P28" loext:marker-style-name="T7"/>
      <text:p text:style-name="P28" loext:marker-style-name="T7"/>
      <text:p text:style-name="P28" loext:marker-style-name="T7"/>
      <text:p text:style-name="P28" loext:marker-style-name="T7"/>
      <text:p text:style-name="P29" loext:marker-style-name="T7">5. <text:span text:style-name="T11">Product return: </text:span><text:span text:style-name="T10">Calculated the number of return of products by customers. Laptop has the highest return amo</text:span><text:span text:style-name="T12">ng the products.</text:span></text:p>
      <text:p text:style-name="P30" loext:marker-style-name="T7"/>
      <text:p text:style-name="P31" loext:marker-style-name="T7"><draw:frame draw:style-name="fr1" draw:name="Image12" text:anchor-type="char" svg:x="0.55cm" svg:y="0.254cm" svg:width="4.048cm" svg:height="5.144cm" draw:z-index="11"><draw:image xlink:href="Pictures/10000001000000B5000000E630878F5A.png" xlink:type="simple" xlink:show="embed" xlink:actuate="onLoad" draw:mime-type="image/png"/></draw:frame><text:s text:c="3"/></text:p>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1" loext:marker-style-name="T7"/>
      <text:p text:style-name="P32" loext:marker-style-name="T7"/>
      <text:p text:style-name="P33" loext:marker-style-name="T7">6. Popular and most profitable payment method: <text:span text:style-name="T8">Found the most used payment method used by the customers to buy our products. Online payment method is the most used payment method. The next most used is by cash.</text:span></text:p>
      <text:p text:style-name="P34" loext:marker-style-name="T7"/>
      <text:p text:style-name="P34" loext:marker-style-name="T7"><draw:frame draw:style-name="fr1" draw:name="Image13" text:anchor-type="char" svg:x="0.293cm" svg:y="0.741cm" svg:width="11.299cm" svg:height="4.89cm" draw:z-index="12"><draw:image xlink:href="Pictures/10000001000001BE000000C1259CC32C.png" xlink:type="simple" xlink:show="embed" xlink:actuate="onLoad" draw:mime-type="image/png"/></draw:frame><text:s text:c="2"/></text:p>
      <text:p text:style-name="P34" loext:marker-style-name="T7"><text:s text:c="2"/></text:p>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4" loext:marker-style-name="T7"/>
      <text:p text:style-name="P35" loext:marker-style-name="T7"><text:soft-page-break/>7. Store orders: <text:span text:style-name="T8">Calculated which store has the highest average order value. Store D has the <text:s/>highest average order value </text:span><text:span text:style-name="T13">among the 4 stores.</text:span></text:p>
      <text:p text:style-name="P36" loext:marker-style-name="T7"/>
      <text:p text:style-name="P36" loext:marker-style-name="T7"><draw:frame draw:style-name="fr1" draw:name="Image14" text:anchor-type="char" svg:x="0.325cm" svg:y="0.254cm" svg:width="6.489cm" svg:height="3.874cm" draw:z-index="13"><draw:image xlink:href="Pictures/100000010000010C000000A0669C53A5.png" xlink:type="simple" xlink:show="embed" xlink:actuate="onLoad" draw:mime-type="image/png"/></draw:frame><text:s text:c="2"/></text:p>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7" loext:marker-style-name="T7"/>
      <text:p text:style-name="P37" loext:marker-style-name="T7"/>
      <text:p text:style-name="P37" loext:marker-style-name="T7">8. Regional Delivery Time: <text:span text:style-name="T8">Found the regional average deliver time. The central and south regions take less time in delivery than west, east and north regions.</text:span></text:p>
      <text:p text:style-name="P36" loext:marker-style-name="T7"/>
      <text:p text:style-name="P36" loext:marker-style-name="T7"><draw:frame draw:style-name="fr1" draw:name="Image15" text:anchor-type="char" svg:x="0.318cm" svg:y="0.192cm" svg:width="4.935cm" svg:height="4.491cm" draw:z-index="14"><draw:image xlink:href="Pictures/10000001000000C8000000B60E919271.png" xlink:type="simple" xlink:show="embed" xlink:actuate="onLoad" draw:mime-type="image/png"/></draw:frame></text:p>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7" loext:marker-style-name="T7">9. Management performance: <text:span text:style-name="T8">Calculated which </text:span><text:span text:style-name="T14">regional managers oversee the most profitable region. Ryan oversees the most profitable region which is the north region.</text:span></text:p>
      <text:p text:style-name="P38" loext:marker-style-name="T7"/>
      <text:p text:style-name="P38" loext:marker-style-name="T7"><draw:frame draw:style-name="fr1" draw:name="Image16" text:anchor-type="char" svg:x="0.168cm" svg:y="0.275cm" svg:width="9.934cm" svg:height="4.039cm" draw:z-index="15"><draw:image xlink:href="Pictures/10000001000001A2000000AA4A6514DF.png" xlink:type="simple" xlink:show="embed" xlink:actuate="onLoad" draw:mime-type="image/png"/></draw:frame></text:p>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8" loext:marker-style-name="T7"/>
      <text:p text:style-name="P39" loext:marker-style-name="T15"><text:soft-page-break/>5. Dashboard in Power BI</text:p>
      <text:p text:style-name="P39" loext:marker-style-name="T15"/>
      <text:p text:style-name="P40" loext:marker-style-name="T7"><draw:frame draw:style-name="fr3" draw:name="Image17" text:anchor-type="char" svg:width="17.54cm" svg:height="9.82cm" draw:z-index="16"><draw:image xlink:href="Pictures/1000000100000526000002E26104014B.png" xlink:type="simple" xlink:show="embed" xlink:actuate="onLoad" draw:mime-type="image/png"/></draw:frame><text:s text:c="4"/></text:p>
      <text:p text:style-name="P40" loext:marker-style-name="T7"/>
      <text:p text:style-name="P39" loext:marker-style-name="T15">6. Business Recommendations</text:p>
      <text:p text:style-name="P40" loext:marker-style-name="T7"/>
      <text:p text:style-name="P41" loext:marker-style-name="T16">1. Regional strategy:<text:span text:style-name="T8"> The North region leads in sales and profit managed by Ryan.</text:span></text:p>
      <text:p text:style-name="P42" loext:marker-style-name="T16">Study what's working in the North, is it the management, sales team or product mix. Implement those practices in underperforming regions. <text:span text:style-name="T17">Also i</text:span>nvestigate why the <text:span text:style-name="T17">w</text:span>est, <text:span text:style-name="T17">e</text:span>ast, and <text:span text:style-name="T17">n</text:span>orth regions have longer delivery times despite <text:span text:style-name="T17">n</text:span>orth being the top performer. </text:p>
      <text:p text:style-name="P42" loext:marker-style-name="T16"/>
      <text:p text:style-name="P43" loext:marker-style-name="T7">2. Product return: <text:span text:style-name="T8">Laptops are the top seller but also the no.1 returned product.</text:span></text:p>
      <text:p text:style-name="P44" loext:marker-style-name="T16">Investigate the cause of laptop returns, is it product defects, customer mismatch expectation or delivery damage. A return rate silently kills the profit. Consider adding better product descriptions, open box delivery, or improving customer support to reduce laptop returns. Tablets and Printers have strong sales with lower returns.</text:p>
      <text:p text:style-name="P43" loext:marker-style-name="T16"/>
      <text:p text:style-name="P45" loext:marker-style-name="T7">3. Salesperson incentives: <text:span text:style-name="T8">Rethink the commission structure. </text:span></text:p>
      <text:p text:style-name="P46" loext:marker-style-name="T7">Alice sold the highest quantity but Bob generated more profit by selling fewer, higher priced items.</text:p>
      <text:p text:style-name="P46" loext:marker-style-name="T7">If the commission structure is purely on quantity sold based, it may be rewarding the wrong person. Shift incentives toward profit based commissions rather than quantity sold. Use Bob's strategy in training understanding which products have higher margins and a<text:span text:style-name="T18">tt</text:span>racting customers toward them is a high value skill. Alice may benefit from selling premium products.</text:p>
      <text:p text:style-name="P44" loext:marker-style-name="T7"/>
      <text:p text:style-name="P47" loext:marker-style-name="T7">4. Payment methods: <text:span text:style-name="T8">Online payment is the most popular method followed by cash.</text:span></text:p>
      <text:p text:style-name="P48" loext:marker-style-name="T7">Invest in a secure online payment method. Consider adding Buy Now Pay Later options to increase average order value. Also don't avoid cash handling, a portion of the customers still relies on it.</text:p>
      <text:p text:style-name="P48" loext:marker-style-name="T7"/>
      <text:p text:style-name="P49" loext:marker-style-name="T16">5. Store performance: <text:span text:style-name="T8"><text:s/>Learn from Store D.</text:span></text:p>
      <text:p text:style-name="P50" loext:marker-style-name="T16">Store D has the highest average order value and sales among all four stores. Analyse what Store D does differently store layout, staff training, or selling techniques.</text:p>
      <text:p text:style-name="P49" loext:marker-style-name="T7"/>
      <text:p text:style-name="P49" loext:marker-style-name="T7"/>
      <text:p text:style-name="P49" loext:marker-style-name="T7"><text:soft-page-break/>6. Delivery time: <text:span text:style-name="T8">A Hidden Competitive Advantage.</text:span></text:p>
      <text:p text:style-name="P50" loext:marker-style-name="T7">Central and South regions deliver faster than North, East, and West.</text:p>
      <text:p text:style-name="P50" loext:marker-style-name="T7">Faster delivery impacts customer satisfaction and reduces return rates. Prioritise reducing delivery times in the slower regions. Consider partnering with regional logistics providers or study the reasons for fast delivery from Central and South.</text:p>
      <text:p text:style-name="P50" loext:marker-style-name="T7"/>
      <text:p text:style-name="P50" loext:marker-style-name="T7"/>
      <text:p text:style-name="P50" loext:marker-style-name="T7"/>
      <text:p text:style-name="P50" loext:marker-style-name="T7"/>
      <text:p text:style-name="P50" loext:marker-style-name="T7"/>
      <text:p text:style-name="P50" loext:marker-style-name="T7"/>
      <text:p text:style-name="P50" loext:marker-style-name="T7"/>
      <text:p text:style-name="P50" loext:marker-style-name="T7"/>
      <text:p text:style-name="P50" loext:marker-style-name="T7"/>
      <text:p text:style-name="P50" loext:marker-style-name="T16"/>
      <text:p text:style-name="P44" loext:marker-style-name="T7"/>
      <text:p text:style-name="P40" loext:marker-style-name="T7"/>
      <text:p text:style-name="P40"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text-align="left" style:justify-single-word="false" fo:orphans="2" fo:widows="2" fo:hyphenation-ladder-count="no-limit" fo:hyphenation-keep="auto" loext:hyphenation-keep-type="column" loext:hyphenation-keep-line="false" style:vertical-align="baseline"/>
      <style:text-properties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3" text:style-name="ListLabel_20_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21:14:08.910293600</meta:creation-date>
    <dc:date>2026-06-30T21:30:53.786122100</dc:date>
    <meta:editing-duration>PT40M51S</meta:editing-duration>
    <meta:editing-cycles>10</meta:editing-cycles>
    <meta:generator>LibreOffice/26.2.4.2$Windows_X86_64 LibreOffice_project/0229ac93fcf0d7cbc6376066c6f35021cef002dc</meta:generator>
    <meta:document-statistic meta:table-count="0" meta:image-count="17" meta:object-count="0" meta:page-count="8" meta:paragraph-count="54" meta:word-count="779" meta:character-count="4911" meta:non-whitespace-character-count="4153"/>
  </office:meta>
</office:document-meta>
</file>